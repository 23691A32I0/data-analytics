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035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43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lumn1</text:p>
          </table:table-cell>
          <table:table-cell table:style-name="ce4"/>
          <table:table-cell office:value-type="string" table:style-name="ce4">
            <text:p>Column2</text:p>
          </table:table-cell>
          <table:table-cell table:style-name="ce4"/>
          <table:table-cell office:value-type="string" table:style-name="ce4">
            <text:p>Column3</text:p>
          </table:table-cell>
          <table:table-cell table:style-name="ce4"/>
          <table:table-cell office:value-type="string" table:style-name="ce4">
            <text:p>Column4</text:p>
          </table:table-cell>
          <table:table-cell table:style-name="ce4"/>
          <table:table-cell office:value-type="string" table:style-name="ce4">
            <text:p>Column5</text:p>
          </table:table-cell>
          <table:table-cell table:style-name="ce4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85.260869565217391" table:style-name="ce2">
            <text:p>85.26086957</text:p>
          </table:table-cell>
          <table:table-cell office:value-type="string" table:style-name="ce2">
            <text:p>Mean</text:p>
          </table:table-cell>
          <table:table-cell office:value-type="float" office:value="132.17391304347825" table:style-name="ce2">
            <text:p>132.173913</text:p>
          </table:table-cell>
          <table:table-cell office:value-type="string" table:style-name="ce2">
            <text:p>Mean</text:p>
          </table:table-cell>
          <table:table-cell office:value-type="float" office:value="90.782608695652172" table:style-name="ce2">
            <text:p>90.7826087</text:p>
          </table:table-cell>
          <table:table-cell office:value-type="string" table:style-name="ce2">
            <text:p>Mean</text:p>
          </table:table-cell>
          <table:table-cell office:value-type="float" office:value="93.478260869565219" table:style-name="ce2">
            <text:p>93.47826087</text:p>
          </table:table-cell>
          <table:table-cell office:value-type="string" table:style-name="ce2">
            <text:p>Mean</text:p>
          </table:table-cell>
          <table:table-cell office:value-type="float" office:value="37.478260869565212" table:style-name="ce2">
            <text:p>37.4782608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tandard Error</text:p>
          </table:table-cell>
          <table:table-cell office:value-type="float" office:value="3.7554794703987362" table:style-name="ce2">
            <text:p>3.75547947</text:p>
          </table:table-cell>
          <table:table-cell office:value-type="string" table:style-name="ce2">
            <text:p>Standard Error</text:p>
          </table:table-cell>
          <table:table-cell office:value-type="float" office:value="4.6555895997602148" table:style-name="ce2">
            <text:p>4.6555896</text:p>
          </table:table-cell>
          <table:table-cell office:value-type="string" table:style-name="ce2">
            <text:p>Standard Error</text:p>
          </table:table-cell>
          <table:table-cell office:value-type="float" office:value="3.9592571875580131" table:style-name="ce2">
            <text:p>3.959257188</text:p>
          </table:table-cell>
          <table:table-cell office:value-type="string" table:style-name="ce2">
            <text:p>Standard Error</text:p>
          </table:table-cell>
          <table:table-cell office:value-type="float" office:value="0.63765121501138777" table:style-name="ce2">
            <text:p>0.637651215</text:p>
          </table:table-cell>
          <table:table-cell office:value-type="string" table:style-name="ce2">
            <text:p>Standard Error</text:p>
          </table:table-cell>
          <table:table-cell office:value-type="float" office:value="0.25860346449225396" table:style-name="ce2">
            <text:p>0.25860346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edian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Median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Median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Median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Median</text:p>
          </table:table-cell>
          <table:table-cell office:value-type="float" office:value="37.5" table:style-name="ce2">
            <text:p>37.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de</text:p>
          </table:table-cell>
          <table:table-cell office:value-type="float" office:value="0" table:formula="of:=#N/A" table:style-name="ce2">
            <text:p>#N/A</text:p>
          </table:table-cell>
          <table:table-cell office:value-type="string" table:style-name="ce2">
            <text:p>Mode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Mode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Mode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Mode</text:p>
          </table:table-cell>
          <table:table-cell office:value-type="float" office:value="38.799999999999997" table:style-name="ce2">
            <text:p>38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tandard Deviation</text:p>
          </table:table-cell>
          <table:table-cell office:value-type="float" office:value="18.010646829292014" table:style-name="ce2">
            <text:p>18.01064683</text:p>
          </table:table-cell>
          <table:table-cell office:value-type="string" table:style-name="ce2">
            <text:p>Standard Deviation</text:p>
          </table:table-cell>
          <table:table-cell office:value-type="float" office:value="22.327423362136884" table:style-name="ce2">
            <text:p>22.32742336</text:p>
          </table:table-cell>
          <table:table-cell office:value-type="string" table:style-name="ce2">
            <text:p>Standard Deviation</text:p>
          </table:table-cell>
          <table:table-cell office:value-type="float" office:value="18.987930428993177" table:style-name="ce2">
            <text:p>18.98793043</text:p>
          </table:table-cell>
          <table:table-cell office:value-type="string" table:style-name="ce2">
            <text:p>Standard Deviation</text:p>
          </table:table-cell>
          <table:table-cell office:value-type="float" office:value="3.0580677978302702" table:style-name="ce2">
            <text:p>3.058067798</text:p>
          </table:table-cell>
          <table:table-cell office:value-type="string" table:style-name="ce2">
            <text:p>Standard Deviation</text:p>
          </table:table-cell>
          <table:table-cell office:value-type="float" office:value="1.2402186470498329" table:style-name="ce2">
            <text:p>1.24021864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ample Variance</text:p>
          </table:table-cell>
          <table:table-cell office:value-type="float" office:value="324.38339920948653" table:style-name="ce2">
            <text:p>324.3833992</text:p>
          </table:table-cell>
          <table:table-cell office:value-type="string" table:style-name="ce2">
            <text:p>Sample Variance</text:p>
          </table:table-cell>
          <table:table-cell office:value-type="float" office:value="498.5138339920959" table:style-name="ce2">
            <text:p>498.513834</text:p>
          </table:table-cell>
          <table:table-cell office:value-type="string" table:style-name="ce2">
            <text:p>Sample Variance</text:p>
          </table:table-cell>
          <table:table-cell office:value-type="float" office:value="360.54150197628502" table:style-name="ce2">
            <text:p>360.541502</text:p>
          </table:table-cell>
          <table:table-cell office:value-type="string" table:style-name="ce2">
            <text:p>Sample Variance</text:p>
          </table:table-cell>
          <table:table-cell office:value-type="float" office:value="9.3517786561264771" table:style-name="ce2">
            <text:p>9.351778656</text:p>
          </table:table-cell>
          <table:table-cell office:value-type="string" table:style-name="ce2">
            <text:p>Sample Variance</text:p>
          </table:table-cell>
          <table:table-cell office:value-type="float" office:value="1.538142292490118" table:style-name="ce2">
            <text:p>1.53814229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Kurtosis</text:p>
          </table:table-cell>
          <table:table-cell office:value-type="float" office:value="-0.90954393386038079" table:style-name="ce2">
            <text:p>-0.909543934</text:p>
          </table:table-cell>
          <table:table-cell office:value-type="string" table:style-name="ce2">
            <text:p>Kurtosis</text:p>
          </table:table-cell>
          <table:table-cell office:value-type="float" office:value="-1.219710463543981" table:style-name="ce2">
            <text:p>-1.219710464</text:p>
          </table:table-cell>
          <table:table-cell office:value-type="string" table:style-name="ce2">
            <text:p>Kurtosis</text:p>
          </table:table-cell>
          <table:table-cell office:value-type="float" office:value="-1.3895312349199078" table:style-name="ce2">
            <text:p>-1.389531235</text:p>
          </table:table-cell>
          <table:table-cell office:value-type="string" table:style-name="ce2">
            <text:p>Kurtosis</text:p>
          </table:table-cell>
          <table:table-cell office:value-type="float" office:value="-0.58809371543062028" table:style-name="ce2">
            <text:p>-0.588093715</text:p>
          </table:table-cell>
          <table:table-cell office:value-type="string" table:style-name="ce2">
            <text:p>Kurtosis</text:p>
          </table:table-cell>
          <table:table-cell office:value-type="float" office:value="-1.316117883810056" table:style-name="ce2">
            <text:p>-1.31611788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kewness</text:p>
          </table:table-cell>
          <table:table-cell office:value-type="float" office:value="0.18498174044538995" table:style-name="ce2">
            <text:p>0.18498174</text:p>
          </table:table-cell>
          <table:table-cell office:value-type="string" table:style-name="ce2">
            <text:p>Skewness</text:p>
          </table:table-cell>
          <table:table-cell office:value-type="float" office:value="-0.21482477645389292" table:style-name="ce2">
            <text:p>-0.214824776</text:p>
          </table:table-cell>
          <table:table-cell office:value-type="string" table:style-name="ce2">
            <text:p>Skewness</text:p>
          </table:table-cell>
          <table:table-cell office:value-type="float" office:value="-0.11320863793245747" table:style-name="ce2">
            <text:p>-0.113208638</text:p>
          </table:table-cell>
          <table:table-cell office:value-type="string" table:style-name="ce2">
            <text:p>Skewness</text:p>
          </table:table-cell>
          <table:table-cell office:value-type="float" office:value="6.4919014587626278E-2" table:style-name="ce2">
            <text:p>0.064919015</text:p>
          </table:table-cell>
          <table:table-cell office:value-type="string" table:style-name="ce2">
            <text:p>Skewness</text:p>
          </table:table-cell>
          <table:table-cell office:value-type="float" office:value="-0.10130511972326003" table:style-name="ce2">
            <text:p>-0.1013051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ange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Range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Range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Range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Range</text:p>
          </table:table-cell>
          <table:table-cell office:value-type="float" office:value="3.7999999999999972" table:style-name="ce2">
            <text:p>3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inimum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Minimum</text:p>
          </table:table-cell>
          <table:table-cell office:value-type="float" office:value="95" table:style-name="ce2">
            <text:p>95</text:p>
          </table:table-cell>
          <table:table-cell office:value-type="string" table:style-name="ce2">
            <text:p>Minimum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Minimum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Minimum</text:p>
          </table:table-cell>
          <table:table-cell office:value-type="float" office:value="35.5" table:style-name="ce2">
            <text:p>35.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aximum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Maximum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Maximum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Maximum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Maximum</text:p>
          </table:table-cell>
          <table:table-cell office:value-type="float" office:value="39.299999999999997" table:style-name="ce2">
            <text:p>39.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um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Sum</text:p>
          </table:table-cell>
          <table:table-cell office:value-type="float" office:value="3040" table:style-name="ce2">
            <text:p>3040</text:p>
          </table:table-cell>
          <table:table-cell office:value-type="string" table:style-name="ce2">
            <text:p>Sum</text:p>
          </table:table-cell>
          <table:table-cell office:value-type="float" office:value="2088" table:style-name="ce2">
            <text:p>2088</text:p>
          </table:table-cell>
          <table:table-cell office:value-type="string" table:style-name="ce2">
            <text:p>Sum</text:p>
          </table:table-cell>
          <table:table-cell office:value-type="float" office:value="2150" table:style-name="ce2">
            <text:p>2150</text:p>
          </table:table-cell>
          <table:table-cell office:value-type="string" table:style-name="ce2">
            <text:p>Sum</text:p>
          </table:table-cell>
          <table:table-cell office:value-type="float" office:value="861.99999999999989" table:style-name="ce2">
            <text:p>8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ount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Count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Count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Count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Count</text:p>
          </table:table-cell>
          <table:table-cell office:value-type="float" office:value="23" table:style-name="ce3">
            <text:p>23</text:p>
          </table:table-cell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SUMMARY OUTPUT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5">
            <text:p>Regression Statistics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2">
            <text:p>Multiple R</text:p>
          </table:table-cell>
          <table:table-cell office:value-type="float" office:value="0.64754744608458581" table:style-name="ce2">
            <text:p>0.6475474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 Square</text:p>
          </table:table-cell>
          <table:table-cell office:value-type="float" office:value="0.41931769493066956" table:style-name="ce2">
            <text:p>0.4193176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djusted R Square</text:p>
          </table:table-cell>
          <table:table-cell office:value-type="float" office:value="0.29027718269304059" table:style-name="ce2">
            <text:p>0.2902771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andard Error</text:p>
          </table:table-cell>
          <table:table-cell office:value-type="float" office:value="1.0448227989688357" table:style-name="ce2">
            <text:p>1.04482279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Observations</text:p>
          </table:table-cell>
          <table:table-cell office:value-type="float" office:value="23" table:style-name="ce3">
            <text:p>2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ANOVA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string" table:style-name="ce4">
            <text:p>df</text:p>
          </table:table-cell>
          <table:table-cell office:value-type="string" table:style-name="ce4">
            <text:p>SS</text:p>
          </table:table-cell>
          <table:table-cell office:value-type="string" table:style-name="ce4">
            <text:p>MS</text:p>
          </table:table-cell>
          <table:table-cell office:value-type="string" table:style-name="ce4">
            <text:p>F</text:p>
          </table:table-cell>
          <table:table-cell office:value-type="string" table:style-name="ce4">
            <text:p>Significanc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egression</text:p>
          </table:table-cell>
          <table:table-cell office:value-type="float" office:value="4" table:style-name="ce2">
            <text:p>4</text:p>
          </table:table-cell>
          <table:table-cell office:value-type="float" office:value="14.189346172371305" table:style-name="ce2">
            <text:p>14.18934617</text:p>
          </table:table-cell>
          <table:table-cell office:value-type="float" office:value="3.5473365430928263" table:style-name="ce2">
            <text:p>3.547336543</text:p>
          </table:table-cell>
          <table:table-cell office:value-type="float" office:value="3.2495042654394704" table:style-name="ce2">
            <text:p>3.249504265</text:p>
          </table:table-cell>
          <table:table-cell office:value-type="float" office:value="3.58357864500157E-2" table:style-name="ce2">
            <text:p>0.0358357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esidual</text:p>
          </table:table-cell>
          <table:table-cell office:value-type="float" office:value="18" table:style-name="ce2">
            <text:p>18</text:p>
          </table:table-cell>
          <table:table-cell office:value-type="float" office:value="19.649784262411291" table:style-name="ce2">
            <text:p>19.64978426</text:p>
          </table:table-cell>
          <table:table-cell office:value-type="float" office:value="1.0916546812450718" table:style-name="ce2">
            <text:p>1.091654681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22" table:style-name="ce3">
            <text:p>22</text:p>
          </table:table-cell>
          <table:table-cell office:value-type="float" office:value="33.839130434782597" table:style-name="ce3">
            <text:p>33.83913043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4"/>
          <table:table-cell office:value-type="string" table:style-name="ce4">
            <text:p>Coefficients</text:p>
          </table:table-cell>
          <table:table-cell office:value-type="string" table:style-name="ce4">
            <text:p>Standard Error</text:p>
          </table:table-cell>
          <table:table-cell office:value-type="string" table:style-name="ce4">
            <text:p>t Stat</text:p>
          </table:table-cell>
          <table:table-cell office:value-type="string" table:style-name="ce4">
            <text:p>P-value</text:p>
          </table:table-cell>
          <table:table-cell office:value-type="string" table:style-name="ce4">
            <text:p>Lower 95%</text:p>
          </table:table-cell>
          <table:table-cell office:value-type="string" table:style-name="ce4">
            <text:p>Upper 95%</text:p>
          </table:table-cell>
          <table:table-cell office:value-type="string" table:style-name="ce4">
            <text:p>Lower 95.0%</text:p>
          </table:table-cell>
          <table:table-cell office:value-type="string" table:style-name="ce4">
            <text:p>Upper 95.0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ercept</text:p>
          </table:table-cell>
          <table:table-cell office:value-type="float" office:value="32.392197955903335" table:style-name="ce2">
            <text:p>32.39219796</text:p>
          </table:table-cell>
          <table:table-cell office:value-type="float" office:value="6.998309718869594" table:style-name="ce2">
            <text:p>6.998309719</text:p>
          </table:table-cell>
          <table:table-cell office:value-type="float" office:value="4.6285745068647097" table:style-name="ce2">
            <text:p>4.628574507</text:p>
          </table:table-cell>
          <table:table-cell office:value-type="float" office:value="2.0872191604087728E-4" table:style-name="ce2">
            <text:p>0.000208722</text:p>
          </table:table-cell>
          <table:table-cell office:value-type="float" office:value="17.689294823097143" table:style-name="ce2">
            <text:p>17.68929482</text:p>
          </table:table-cell>
          <table:table-cell office:value-type="float" office:value="47.095101088709526" table:style-name="ce2">
            <text:p>47.09510109</text:p>
          </table:table-cell>
          <table:table-cell office:value-type="float" office:value="17.689294823097143" table:style-name="ce2">
            <text:p>17.68929482</text:p>
          </table:table-cell>
          <table:table-cell office:value-type="float" office:value="47.095101088709526" table:style-name="ce2">
            <text:p>47.095101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 Variable 1</text:p>
          </table:table-cell>
          <table:table-cell office:value-type="float" office:value="-3.6386541108759288E-2" table:style-name="ce2">
            <text:p>-0.036386541</text:p>
          </table:table-cell>
          <table:table-cell office:value-type="float" office:value="1.2985709035596602E-2" table:style-name="ce2">
            <text:p>0.012985709</text:p>
          </table:table-cell>
          <table:table-cell office:value-type="float" office:value="-2.8020450026268113" table:style-name="ce2">
            <text:p>-2.802045003</text:p>
          </table:table-cell>
          <table:table-cell office:value-type="float" office:value="1.1784962981090902E-2" table:style-name="ce2">
            <text:p>0.011784963</text:p>
          </table:table-cell>
          <table:table-cell office:value-type="float" office:value="-6.3668503429801376E-2" table:style-name="ce2">
            <text:p>-0.063668503</text:p>
          </table:table-cell>
          <table:table-cell office:value-type="float" office:value="-9.1045787877171956E-3" table:style-name="ce2">
            <text:p>-0.009104579</text:p>
          </table:table-cell>
          <table:table-cell office:value-type="float" office:value="-6.3668503429801376E-2" table:style-name="ce2">
            <text:p>-0.063668503</text:p>
          </table:table-cell>
          <table:table-cell office:value-type="float" office:value="-9.1045787877171956E-3" table:style-name="ce2">
            <text:p>-0.0091045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 Variable 2</text:p>
          </table:table-cell>
          <table:table-cell office:value-type="float" office:value="-7.5437393873115455E-3" table:style-name="ce2">
            <text:p>-0.007543739</text:p>
          </table:table-cell>
          <table:table-cell office:value-type="float" office:value="1.0823723647661486E-2" table:style-name="ce2">
            <text:p>0.010823724</text:p>
          </table:table-cell>
          <table:table-cell office:value-type="float" office:value="-0.69696341415196839" table:style-name="ce2">
            <text:p>-0.696963414</text:p>
          </table:table-cell>
          <table:table-cell office:value-type="float" office:value="0.49472942635285333" table:style-name="ce2">
            <text:p>0.494729426</text:p>
          </table:table-cell>
          <table:table-cell office:value-type="float" office:value="-3.028353895616168E-2" table:style-name="ce2">
            <text:p>-0.030283539</text:p>
          </table:table-cell>
          <table:table-cell office:value-type="float" office:value="1.5196060181538591E-2" table:style-name="ce2">
            <text:p>0.01519606</text:p>
          </table:table-cell>
          <table:table-cell office:value-type="float" office:value="-3.028353895616168E-2" table:style-name="ce2">
            <text:p>-0.030283539</text:p>
          </table:table-cell>
          <table:table-cell office:value-type="float" office:value="1.5196060181538591E-2" table:style-name="ce2">
            <text:p>0.015196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 Variable 3</text:p>
          </table:table-cell>
          <table:table-cell office:value-type="float" office:value="9.0548621976122758E-3" table:style-name="ce2">
            <text:p>0.009054862</text:p>
          </table:table-cell>
          <table:table-cell office:value-type="float" office:value="1.2193681476276825E-2" table:style-name="ce2">
            <text:p>0.012193681</text:p>
          </table:table-cell>
          <table:table-cell office:value-type="float" office:value="0.74258641372819056" table:style-name="ce2">
            <text:p>0.742586414</text:p>
          </table:table-cell>
          <table:table-cell office:value-type="float" office:value="0.46731322358930572" table:style-name="ce2">
            <text:p>0.467313224</text:p>
          </table:table-cell>
          <table:table-cell office:value-type="float" office:value="-1.656311196757658E-2" table:style-name="ce2">
            <text:p>-0.016563112</text:p>
          </table:table-cell>
          <table:table-cell office:value-type="float" office:value="3.4672836362801135E-2" table:style-name="ce2">
            <text:p>0.034672836</text:p>
          </table:table-cell>
          <table:table-cell office:value-type="float" office:value="-1.656311196757658E-2" table:style-name="ce2">
            <text:p>-0.016563112</text:p>
          </table:table-cell>
          <table:table-cell office:value-type="float" office:value="3.4672836362801135E-2" table:style-name="ce2">
            <text:p>0.0346728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X Variable 4</text:p>
          </table:table-cell>
          <table:table-cell office:value-type="float" office:value="8.9469706789447767E-2" table:style-name="ce3">
            <text:p>0.089469707</text:p>
          </table:table-cell>
          <table:table-cell office:value-type="float" office:value="7.3815578311640234E-2" table:style-name="ce3">
            <text:p>0.073815578</text:p>
          </table:table-cell>
          <table:table-cell office:value-type="float" office:value="1.2120707963801047" table:style-name="ce3">
            <text:p>1.212070796</text:p>
          </table:table-cell>
          <table:table-cell office:value-type="float" office:value="0.24115593787938158" table:style-name="ce3">
            <text:p>0.241155938</text:p>
          </table:table-cell>
          <table:table-cell office:value-type="float" office:value="-6.5611068598615541E-2" table:style-name="ce3">
            <text:p>-0.065611069</text:p>
          </table:table-cell>
          <table:table-cell office:value-type="float" office:value="0.24455048217751107" table:style-name="ce3">
            <text:p>0.244550482</text:p>
          </table:table-cell>
          <table:table-cell office:value-type="float" office:value="-6.5611068598615541E-2" table:style-name="ce3">
            <text:p>-0.065611069</text:p>
          </table:table-cell>
          <table:table-cell office:value-type="float" office:value="0.24455048217751107" table:style-name="ce3">
            <text:p>0.244550482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  <table:table table:name="Sheet1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age</text:p>
          </table:table-cell>
          <table:table-cell table:style-name="ce1"/>
          <table:table-cell office:value-type="string" table:style-name="ce1">
            <text:p>heart_rate</text:p>
          </table:table-cell>
          <table:table-cell office:value-type="string" table:style-name="ce1">
            <text:p>systolic_bp</text:p>
          </table:table-cell>
          <table:table-cell office:value-type="string" table:style-name="ce1">
            <text:p>diastolic_bp</text:p>
          </table:table-cell>
          <table:table-cell office:value-type="string" table:style-name="ce1">
            <text:p>oxygen_level</text:p>
          </table:table-cell>
          <table:table-cell office:value-type="string" table:style-name="ce1">
            <text:p>temperature</text:p>
          </table:table-cell>
          <table:table-cell/>
          <table:table-cell table:style-name="ce1">
            <draw:frame draw:z-index="1" draw:id="id0" draw:style-name="a0" draw:name="Chart 1" svg:x="0.15in" svg:y="0.175in" svg:width="4.375in" svg:height="2.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40" table:style-name="ce1">
            <text:p>140</text:p>
          </table:table-cell>
          <table:table-cell office:value-type="float" office:value="115" table:style-name="ce1">
            <text:p>115</text:p>
          </table:table-cell>
          <table:table-cell office:value-type="float" office:value="92" table:style-name="ce1">
            <text:p>92</text:p>
          </table:table-cell>
          <table:table-cell office:value-type="float" office:value="38.799999999999997" table:style-name="ce1">
            <text:p>38.8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36.799999999999997" table:style-name="ce1">
            <text:p>36.8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12" table:style-name="ce1">
            <text:p>11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office:value-type="float" office:value="39.299999999999997" table:style-name="ce1">
            <text:p>39.3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52" table:style-name="ce1">
            <text:p>152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office:value-type="float" office:value="38.799999999999997" table:style-name="ce1">
            <text:p>38.8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04" table:style-name="ce1">
            <text:p>104</text:p>
          </table:table-cell>
          <table:table-cell office:value-type="float" office:value="113" table:style-name="ce1">
            <text:p>113</text:p>
          </table:table-cell>
          <table:table-cell office:value-type="float" office:value="95" table:style-name="ce1">
            <text:p>95</text:p>
          </table:table-cell>
          <table:table-cell office:value-type="float" office:value="38.200000000000003" table:style-name="ce1">
            <text:p>38.2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14" table:style-name="ce1">
            <text:p>114</text:p>
          </table:table-cell>
          <table:table-cell office:value-type="float" office:value="106" table:style-name="ce1">
            <text:p>106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06" table:style-name="ce1">
            <text:p>106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37.4" table:style-name="ce1">
            <text:p>37.4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55" table:style-name="ce1">
            <text:p>155</text:p>
          </table:table-cell>
          <table:table-cell office:value-type="float" office:value="108" table:style-name="ce1">
            <text:p>108</text:p>
          </table:table-cell>
          <table:table-cell office:value-type="float" office:value="97" table:style-name="ce1">
            <text:p>97</text:p>
          </table:table-cell>
          <table:table-cell office:value-type="float" office:value="37.5" table:style-name="ce1">
            <text:p>37.5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67" table:style-name="ce1">
            <text:p>167</text:p>
          </table:table-cell>
          <table:table-cell office:value-type="float" office:value="68" table:style-name="ce1">
            <text:p>68</text:p>
          </table:table-cell>
          <table:table-cell office:value-type="float" office:value="99" table:style-name="ce1">
            <text:p>99</text:p>
          </table:table-cell>
          <table:table-cell office:value-type="float" office:value="36.4" table:style-name="ce1">
            <text:p>36.4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42" table:style-name="ce1">
            <text:p>142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35.799999999999997" table:style-name="ce1">
            <text:p>35.8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40" table:style-name="ce1">
            <text:p>140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38.6" table:style-name="ce1">
            <text:p>38.6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128" table:style-name="ce1">
            <text:p>128</text:p>
          </table:table-cell>
          <table:table-cell office:value-type="float" office:value="117" table:style-name="ce1">
            <text:p>117</text:p>
          </table:table-cell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table:style-name="ce1">
            <draw:frame draw:z-index="2" draw:id="id1" draw:style-name="a1" draw:name="Chart 2" svg:x="0.63333in" svg:y="0.029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40" table:style-name="ce1">
            <text:p>140</text:p>
          </table:table-cell>
          <table:table-cell office:value-type="float" office:value="108" table:style-name="ce1">
            <text:p>108</text:p>
          </table:table-cell>
          <table:table-cell office:value-type="float" office:value="92" table:style-name="ce1">
            <text:p>92</text:p>
          </table:table-cell>
          <table:table-cell office:value-type="float" office:value="37.9" table:style-name="ce1">
            <text:p>37.9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59" table:style-name="ce1">
            <text:p>159</text:p>
          </table:table-cell>
          <table:table-cell office:value-type="float" office:value="118" table:style-name="ce1">
            <text:p>118</text:p>
          </table:table-cell>
          <table:table-cell office:value-type="float" office:value="93" table:style-name="ce1">
            <text:p>93</text:p>
          </table:table-cell>
          <table:table-cell office:value-type="float" office:value="39.200000000000003" table:style-name="ce1">
            <text:p>39.2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156" table:style-name="ce1">
            <text:p>156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36.6" table:style-name="ce1">
            <text:p>36.6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109" table:style-name="ce1">
            <text:p>109</text:p>
          </table:table-cell>
          <table:table-cell office:value-type="float" office:value="99" table:style-name="ce1">
            <text:p>99</text:p>
          </table:table-cell>
          <table:table-cell office:value-type="float" office:value="38.9" table:style-name="ce1">
            <text:p>38.9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40" table:style-name="ce1">
            <text:p>140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office:value-type="float" office:value="35.5" table:style-name="ce1">
            <text:p>35.5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1" table:style-name="ce1">
            <text:p>161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office:value-type="float" office:value="35.6" table:style-name="ce1">
            <text:p>35.6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31" table:style-name="ce1">
            <text:p>131</text:p>
          </table:table-cell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37.9" table:style-name="ce1">
            <text:p>37.9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53" table:style-name="ce1">
            <text:p>153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04" table:style-name="ce1">
            <text:p>104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18" table:style-name="ce1">
            <text:p>118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37.799999999999997" table:style-name="ce1">
            <text:p>37.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mean</text:p>
          </table:table-cell>
          <table:table-cell office:value-type="float" office:value="85.260869565217391" table:formula="of:=AVERAGE([.C2:.C24])" table:style-name="ce1">
            <text:p>85.26086957</text:p>
          </table:table-cell>
          <table:table-cell office:value-type="float" office:value="132.17391304347825" table:formula="of:=AVERAGE([.D2:.D24])" table:style-name="ce1">
            <text:p>132.173913</text:p>
          </table:table-cell>
          <table:table-cell office:value-type="float" office:value="90.782608695652172" table:formula="of:=AVERAGE([.E2:.E24])" table:style-name="ce1">
            <text:p>90.7826087</text:p>
          </table:table-cell>
          <table:table-cell office:value-type="float" office:value="93.478260869565219" table:formula="of:=AVERAGE([.F2:.F24])" table:style-name="ce1">
            <text:p>93.47826087</text:p>
          </table:table-cell>
          <table:table-cell office:value-type="float" office:value="37.478260869565212" table:formula="of:=AVERAGE([.G2:.G24])" table:style-name="ce1">
            <text:p>37.4782608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mode</text:p>
          </table:table-cell>
          <table:table-cell office:value-type="float" office:value="0" table:formula="of:=MODE([.C2:.C24])" table:style-name="ce1">
            <text:p>#N/A</text:p>
          </table:table-cell>
          <table:table-cell office:value-type="float" office:value="140" table:formula="of:=MODE([.D2:.D24])" table:style-name="ce1">
            <text:p>140</text:p>
          </table:table-cell>
          <table:table-cell office:value-type="float" office:value="94" table:formula="of:=MODE([.E2:.E24])" table:style-name="ce1">
            <text:p>94</text:p>
          </table:table-cell>
          <table:table-cell office:value-type="float" office:value="94" table:formula="of:=MODE([.F2:.F24])" table:style-name="ce1">
            <text:p>94</text:p>
          </table:table-cell>
          <table:table-cell office:value-type="float" office:value="38.799999999999997" table:formula="of:=MODE([.G2:.G24])" table:style-name="ce1">
            <text:p>38.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median</text:p>
          </table:table-cell>
          <table:table-cell office:value-type="float" office:value="81" table:formula="of:=MEDIAN([.C2:.C24])" table:style-name="ce1">
            <text:p>81</text:p>
          </table:table-cell>
          <table:table-cell office:value-type="float" office:value="140" table:formula="of:=MEDIAN([.D2:.D24])" table:style-name="ce1">
            <text:p>140</text:p>
          </table:table-cell>
          <table:table-cell office:value-type="float" office:value="94" table:formula="of:=MEDIAN([.E2:.E24])" table:style-name="ce1">
            <text:p>94</text:p>
          </table:table-cell>
          <table:table-cell office:value-type="float" office:value="94" table:formula="of:=MEDIAN([.F2:.F24])" table:style-name="ce1">
            <text:p>94</text:p>
          </table:table-cell>
          <table:table-cell office:value-type="float" office:value="37.5" table:formula="of:=MEDIAN([.G2:.G24])" table:style-name="ce1">
            <text:p>37.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range</text:p>
          </table:table-cell>
          <table:table-cell office:value-type="float" office:value="63" table:formula="of:=MAX([.C2:.C24])-MIN([.C2:.C24])" table:style-name="ce1">
            <text:p>63</text:p>
          </table:table-cell>
          <table:table-cell office:value-type="float" office:value="72" table:formula="of:=MAX([.D2:.D24])-MIN([.D2:.D24])" table:style-name="ce1">
            <text:p>72</text:p>
          </table:table-cell>
          <table:table-cell office:value-type="float" office:value="56" table:formula="of:=MAX([.E2:.E24])-MIN([.E2:.E24])" table:style-name="ce1">
            <text:p>56</text:p>
          </table:table-cell>
          <table:table-cell office:value-type="float" office:value="11" table:formula="of:=MAX([.F2:.F24])-MIN([.F2:.F24])" table:style-name="ce1">
            <text:p>11</text:p>
          </table:table-cell>
          <table:table-cell office:value-type="float" office:value="3.7999999999999972" table:formula="of:=MAX([.G2:.G24])-MIN([.G2:.G24])" table:style-name="ce1">
            <text:p>3.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variance</text:p>
          </table:table-cell>
          <table:table-cell office:value-type="float" office:value="324.38339920948653" table:formula="of:=VAR([.C2:.C24])" table:style-name="ce1">
            <text:p>324.3833992</text:p>
          </table:table-cell>
          <table:table-cell office:value-type="float" office:value="498.5138339920959" table:formula="of:=VAR([.D2:.D24])" table:style-name="ce1">
            <text:p>498.513834</text:p>
          </table:table-cell>
          <table:table-cell office:value-type="float" office:value="360.54150197628502" table:formula="of:=VAR([.E2:.E24])" table:style-name="ce1">
            <text:p>360.541502</text:p>
          </table:table-cell>
          <table:table-cell office:value-type="float" office:value="9.3517786561264771" table:formula="of:=VAR([.F2:.F24])" table:style-name="ce1">
            <text:p>9.351778656</text:p>
          </table:table-cell>
          <table:table-cell office:value-type="float" office:value="1.538142292490118" table:formula="of:=VAR([.G2:.G24])" table:style-name="ce1">
            <text:p>1.53814229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stand_deviation</text:p>
          </table:table-cell>
          <table:table-cell office:value-type="float" office:value="18.010646829292014" table:formula="of:=STDEV([.C2:.C24])" table:style-name="ce1">
            <text:p>18.01064683</text:p>
          </table:table-cell>
          <table:table-cell office:value-type="float" office:value="22.327423362136884" table:formula="of:=STDEV([.D2:.D24])" table:style-name="ce1">
            <text:p>22.32742336</text:p>
          </table:table-cell>
          <table:table-cell office:value-type="float" office:value="18.987930428993177" table:formula="of:=STDEV([.E2:.E24])" table:style-name="ce1">
            <text:p>18.98793043</text:p>
          </table:table-cell>
          <table:table-cell office:value-type="float" office:value="3.0580677978302702" table:formula="of:=STDEV([.F2:.F24])" table:style-name="ce1">
            <text:p>3.058067798</text:p>
          </table:table-cell>
          <table:table-cell office:value-type="float" office:value="1.2402186470498329" table:formula="of:=STDEV([.G2:.G24])" table:style-name="ce1">
            <text:p>1.240218647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relation</text:p>
          </table:table-cell>
          <table:table-cell office:value-type="float" office:value="0.27297238724579298" table:formula="of:=CORREL([.C2:.C24];[.D2:.D24])" table:style-name="ce1">
            <text:p>0.272972387</text:p>
          </table:table-cell>
          <table:table-cell office:value-type="float" office:value="-0.23417452641249312" table:formula="of:=CORREL([.D2:.D24];[.E2:.E24])" table:style-name="ce1">
            <text:p>-0.234174526</text:p>
          </table:table-cell>
          <table:table-cell office:value-type="float" office:value="6.3713371365141339E-2" table:formula="of:=CORREL([.E2:.E24];[.F2:.F24])" table:style-name="ce1">
            <text:p>0.063713371</text:p>
          </table:table-cell>
          <table:table-cell office:value-type="float" office:value="0.24495954573950307" table:formula="of:=CORREL([.F2:.F24];[.G2:.G24])" table:style-name="ce1">
            <text:p>0.244959546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929</meta:generator>
    <meta:initial-creator>THIRUVEEDHULA VENKATCHETAN</meta:initial-creator>
    <dc:creator>THIRUVEEDHULA VENKATCHETAN</dc:creator>
    <meta:creation-date>2026-05-27T02:16:50Z</meta:creation-date>
    <dc:date>2026-05-27T02:42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158.4pt" svg:width="315.0pt" chart:style-name="Crt0">
        <chart:plot-area svg:x="4.880236220472441pt" svg:y="0.0pt" svg:width="310.1197637795275pt" svg:height="157.0120472440945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F$1" chart:values-cell-range-address="Sheet1.$F$2:.$F$33" chart:class="chart:bar" chart:attached-axis="primary-y" chart:style-name="G0S0">
            <chart:data-point chart:repeated="32"/>
          </chart:series>
          <chart:series chart:label-cell-address="Sheet1.$G$1" chart:values-cell-range-address="Sheet1.$G$2:.$G$33" chart:class="chart:bar" chart:attached-axis="primary-y" chart:style-name="G0S1">
            <chart:data-point chart:repeated="3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0P15">
      <style:graphic-properties draw:fill="solid" draw:fill-color="#ffcd33" draw:opacity="100%" draw:stroke="solid" svg:stroke-width="0.02778in" svg:stroke-color="#ffffff" svg:stroke-opacity="100%"/>
    </style:style>
    <style:style style:family="chart" style:name="G0S0P16">
      <style:graphic-properties draw:fill="solid" draw:fill-color="#7cafdd" draw:opacity="100%" draw:stroke="solid" svg:stroke-width="0.02778in" svg:stroke-color="#ffffff" svg:stroke-opacity="100%"/>
    </style:style>
    <style:style style:family="chart" style:name="G0S0P17">
      <style:graphic-properties draw:fill="solid" draw:fill-color="#8cc168" draw:opacity="100%" draw:stroke="solid" svg:stroke-width="0.02778in" svg:stroke-color="#ffffff" svg:stroke-opacity="100%"/>
    </style:style>
    <style:style style:family="chart" style:name="G0S0P18">
      <style:graphic-properties draw:fill="solid" draw:fill-color="#335aa1" draw:opacity="100%" draw:stroke="solid" svg:stroke-width="0.02778in" svg:stroke-color="#ffffff" svg:stroke-opacity="100%"/>
    </style:style>
    <style:style style:family="chart" style:name="G0S0P19">
      <style:graphic-properties draw:fill="solid" draw:fill-color="#d26012" draw:opacity="100%" draw:stroke="solid" svg:stroke-width="0.02778in" svg:stroke-color="#ffffff" svg:stroke-opacity="100%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778in" svg:stroke-color="#ffffff" svg:stroke-opacity="100%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778in" svg:stroke-color="#ffffff" svg:stroke-opacity="100%"/>
    </style:style>
    <style:style style:family="chart" style:name="G0S0P30">
      <style:graphic-properties draw:fill="solid" draw:fill-color="#203864" draw:opacity="100%" draw:stroke="solid" svg:stroke-width="0.02778in" svg:stroke-color="#ffffff" svg:stroke-opacity="100%"/>
    </style:style>
    <style:style style:family="chart" style:name="G0S0P1">
      <style:graphic-properties draw:fill="solid" draw:fill-color="#ed7d31" draw:opacity="100%" draw:stroke="solid" svg:stroke-width="0.02778in" svg:stroke-color="#ffffff" svg:stroke-opacity="100%"/>
    </style:style>
    <style:style style:family="chart" style:name="G0S0P31">
      <style:graphic-properties draw:fill="solid" draw:fill-color="#843c0c" draw:opacity="100%" draw:stroke="solid" svg:stroke-width="0.02778in" svg:stroke-color="#ffffff" svg:stroke-opacity="100%"/>
    </style:style>
    <style:style style:family="chart" style:name="G0S0P2">
      <style:graphic-properties draw:fill="solid" draw:fill-color="#a5a5a5" draw:opacity="100%" draw:stroke="solid" svg:stroke-width="0.02778in" svg:stroke-color="#ffffff" svg:stroke-opacity="100%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G0S0P4">
      <style:graphic-properties draw:fill="solid" draw:fill-color="#5b9bd5" draw:opacity="100%" draw:stroke="solid" svg:stroke-width="0.02778in" svg:stroke-color="#ffffff" svg:stroke-opacity="100%"/>
    </style:style>
    <style:style style:family="chart" style:name="G0S0P5">
      <style:graphic-properties draw:fill="solid" draw:fill-color="#70ad47" draw:opacity="100%" draw:stroke="solid" svg:stroke-width="0.02778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solid" svg:stroke-width="0.02778in" svg:stroke-color="#ffffff" svg:stroke-opacity="100%"/>
    </style:style>
    <style:style style:family="chart" style:name="G0S0P7">
      <style:graphic-properties draw:fill="solid" draw:fill-color="#9e480e" draw:opacity="100%" draw:stroke="solid" svg:stroke-width="0.02778in" svg:stroke-color="#ffffff" svg:stroke-opacity="100%"/>
    </style:style>
    <style:style style:family="chart" style:name="G0S0P8">
      <style:graphic-properties draw:fill="solid" draw:fill-color="#636363" draw:opacity="100%" draw:stroke="solid" svg:stroke-width="0.02778in" svg:stroke-color="#ffffff" svg:stroke-opacity="100%"/>
    </style:style>
    <style:style style:family="chart" style:name="G0S0P9">
      <style:graphic-properties draw:fill="solid" draw:fill-color="#997300" draw:opacity="100%" draw:stroke="solid" svg:stroke-width="0.02778in" svg:stroke-color="#ffffff" svg:stroke-opacity="100%"/>
    </style:style>
    <style:style style:family="chart" style:name="G0S0P20">
      <style:graphic-properties draw:fill="solid" draw:fill-color="#848484" draw:opacity="100%" draw:stroke="solid" svg:stroke-width="0.02778in" svg:stroke-color="#ffffff" svg:stroke-opacity="100%"/>
    </style:style>
    <style:style style:family="chart" style:name="G0S0P21">
      <style:graphic-properties draw:fill="solid" draw:fill-color="#cc9a00" draw:opacity="100%" draw:stroke="solid" svg:stroke-width="0.02778in" svg:stroke-color="#ffffff" svg:stroke-opacity="100%"/>
    </style:style>
    <style:style style:family="chart" style:name="G0S0P22">
      <style:graphic-properties draw:fill="solid" draw:fill-color="#327dc2" draw:opacity="100%" draw:stroke="solid" svg:stroke-width="0.02778in" svg:stroke-color="#ffffff" svg:stroke-opacity="100%"/>
    </style:style>
    <style:style style:family="chart" style:name="G0S0P23">
      <style:graphic-properties draw:fill="solid" draw:fill-color="#5a8a39" draw:opacity="100%" draw:stroke="solid" svg:stroke-width="0.02778in" svg:stroke-color="#ffffff" svg:stroke-opacity="100%"/>
    </style:style>
    <style:style style:family="chart" style:name="G0S0P24">
      <style:graphic-properties draw:fill="solid" draw:fill-color="#8faadc" draw:opacity="100%" draw:stroke="solid" svg:stroke-width="0.02778in" svg:stroke-color="#ffffff" svg:stroke-opacity="100%"/>
    </style:style>
    <style:style style:family="chart" style:name="G0S0P25">
      <style:graphic-properties draw:fill="solid" draw:fill-color="#f4b183" draw:opacity="100%" draw:stroke="solid" svg:stroke-width="0.02778in" svg:stroke-color="#ffffff" svg:stroke-opacity="100%"/>
    </style:style>
    <style:style style:family="chart" style:name="G0S0P26">
      <style:graphic-properties draw:fill="solid" draw:fill-color="#c9c9c9" draw:opacity="100%" draw:stroke="solid" svg:stroke-width="0.02778in" svg:stroke-color="#ffffff" svg:stroke-opacity="100%"/>
    </style:style>
    <style:style style:family="chart" style:name="G0S0P27">
      <style:graphic-properties draw:fill="solid" draw:fill-color="#ffd966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9dc3e6" draw:opacity="100%" draw:stroke="solid" svg:stroke-width="0.02778in" svg:stroke-color="#ffffff" svg:stroke-opacity="100%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G0S0P29">
      <style:graphic-properties draw:fill="solid" draw:fill-color="#a9d18e" draw:opacity="100%" draw:stroke="solid" svg:stroke-width="0.02778in" svg:stroke-color="#ffffff" svg:stroke-opacity="100%"/>
    </style:style>
    <style:style style:family="chart" style:name="Flr0">
      <style:chart-properties chart:auto-size="true"/>
      <style:graphic-properties draw:fill="none" draw:stroke="none"/>
    </style:style>
    <style:style style:family="chart" style:name="G0S0P10">
      <style:graphic-properties draw:fill="solid" draw:fill-color="#255e91" draw:opacity="100%" draw:stroke="solid" svg:stroke-width="0.02778in" svg:stroke-color="#ffffff" svg:stroke-opacity="100%"/>
    </style:style>
    <style:style style:family="chart" style:name="G0S0P11">
      <style:graphic-properties draw:fill="solid" draw:fill-color="#43682b" draw:opacity="100%" draw:stroke="solid" svg:stroke-width="0.02778in" svg:stroke-color="#ffffff" svg:stroke-opacity="100%"/>
    </style:style>
    <style:style style:family="chart" style:name="G0S0P12">
      <style:graphic-properties draw:fill="solid" draw:fill-color="#698ed0" draw:opacity="100%" draw:stroke="solid" svg:stroke-width="0.02778in" svg:stroke-color="#ffffff" svg:stroke-opacity="100%"/>
    </style:style>
    <style:style style:family="chart" style:name="G0S0P13">
      <style:graphic-properties draw:fill="solid" draw:fill-color="#f1975a" draw:opacity="100%" draw:stroke="solid" svg:stroke-width="0.02778in" svg:stroke-color="#ffffff" svg:stroke-opacity="100%"/>
    </style:style>
    <style:style style:family="chart" style:name="G0S0P14">
      <style:graphic-properties draw:fill="solid" draw:fill-color="#b7b7b7" draw:opacity="100%" draw:stroke="solid" svg:stroke-width="0.02778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ystolic_bp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/>
          <chart:axis chart:dimension="y"/>
          <chart:series chart:label-cell-address="Sheet1.$D$1" chart:values-cell-range-address="Sheet1.$D$2:.$D$3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